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enorite Display" svg:font-family="Tenorite Display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3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family="graphic" style:name="a0" style:parent-style-name="Graphics">
      <style:graphic-properties fo:border="0.00083in solid #000000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ini Exercise – Text Processing</text:p>
      <text:p text:style-name="P2"/>
      <text:p text:style-name="P3"/>
      <text:p text:style-name="Standard">1. The Bag of Words slide for Text Processing is shown below.</text:p>
      <text:p text:style-name="Standard"/>
      <text:p text:style-name="Standard"><draw:frame draw:z-index="251658240" draw:style-name="a0" draw:name="Image1" text:anchor-type="paragraph" svg:x="0in" svg:y="0in" svg:width="6.6929in" svg:height="3.2917in" style:rel-width="scale" style:rel-height="scale"><draw:image xlink:href="media/image1.png" xlink:type="simple" xlink:show="embed" xlink:actuate="onLoad"/><svg:title/><svg:desc/></draw:frame></text:p>
      <text:p text:style-name="Standard">2.<text:s/>The feature-vector for the middle document is already<text:s/>provided in the slide.<text:s/><text:s/>The Term Frequency is already provided in the start code.<text:s/></text:p>
      <text:p text:style-name="Standard"/>
      <text:p text:style-name="Standard">3. Manually perform IDFs for the vocabulary of the corpus.<text:s/></text:p>
      <text:p text:style-name="Standard"/>
      <text:p text:style-name="Standard">4.<text:s/>Write code to compute the IDFs for the vocabulary of the corpus</text:p>
      <text:p text:style-name="Standard"/>
      <text:p text:style-name="Standard">5. Verify that the results from Steps 3 and 4 are the same.</text:p>
      <text:p text:style-name="Standard"/>
      <text:p text:style-name="Standard">5. Write code to compute the TF-IDFs for the vocabulary of the corpus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enorite Display" svg:font-family="Tenorite Display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enorite Display" style:font-name-asian="Tenorite Display" style:font-name-complex="Tenorite Displa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" fo:hyphenate="false"/>
    </style:style>
    <style:style style:name="ListParagraph" style:display-name="List Paragraph" style:family="paragraph" style:parent-style-name="Normal">
      <style:paragraph-properties style:contextual-spacing="true" style:vertical-align="auto" fo:margin-bottom="0.1111in" fo:line-height="115%" fo:margin-left="0.5in">
        <style:tab-stops/>
      </style:paragraph-properties>
      <style:text-properties style:font-name="Aptos" style:font-name-asian="Aptos" style:font-name-complex="Times New Roman" fo:language="en" fo:country="US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hen Junhua</dc:creator>
    <meta:creation-date>2024-11-16T13:06:00Z</meta:creation-date>
    <dc:date>2026-05-12T08:45:00Z</dc:date>
    <meta:template xlink:href="Normal.dotm" xlink:type="simple"/>
    <meta:editing-cycles>19</meta:editing-cycles>
    <meta:editing-duration>PT5820S</meta:editing-duration>
    <meta:document-statistic meta:page-count="1" meta:paragraph-count="1" meta:word-count="75" meta:character-count="504" meta:row-count="3" meta:non-whitespace-character-count="430"/>
  </office:meta>
</office:document-meta>
</file>